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def7" officeooo:paragraph-rsid="0018def7"/>
    </style:style>
    <style:style style:name="P2" style:family="paragraph" style:parent-style-name="Text_20_body">
      <style:text-properties officeooo:rsid="001adeb3" officeooo:paragraph-rsid="001adeb3"/>
    </style:style>
    <style:style style:name="P3" style:family="paragraph" style:parent-style-name="Text_20_body">
      <style:text-properties officeooo:rsid="001b8df1" officeooo:paragraph-rsid="001b8df1"/>
    </style:style>
    <style:style style:name="P4" style:family="paragraph" style:parent-style-name="Text_20_body">
      <style:text-properties officeooo:rsid="0018def7" officeooo:paragraph-rsid="001adeb3"/>
    </style:style>
    <style:style style:name="T1" style:family="text">
      <style:text-properties officeooo:rsid="0018de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ach node should also have a extended_description key where, optionally and later, a more extended explanation of the node can be written.</text:p>
      <text:p text:style-name="P2">Ideal t<text:span text:style-name="T1">ools that the agent should have:</text:span></text:p>
      <text:p text:style-name="P2">get_node(‘concept string’, optional: which attribute we want) → node json (or just the attribute’s content)</text:p>
      <text:p text:style-name="P2">this can be implemented with a vector database, or, more simply, by a well made hierarchical organization of dictionaries. Maybe a good idea is if the nodes are actually searchable with bash-like tools (find, cd, ecc) so that pi’s folder management capabilities can be leveraged.</text:p>
      <text:p text:style-name="P2">Get_node_relatives (node id or alias, depth, unpack=False, type = both (options children , parents, both)) → both children and parent nodes ids and aliases, or if unpack then also all their jsons</text:p>
      <text:p text:style-name="P2"/>
      <text:p text:style-name="P2">get_learning_path(optional: goal_node) produce and get the current suggested learning nodes in the path, either for learning everything or to get the goal node. The path is generated deterministically from the kg state (like in the repo)</text:p>
      <text:p text:style-name="P2">get_proximal_dev() <text:s/>return proximal development nodes</text:p>
      <text:p text:style-name="P2"/>
      <text:p text:style-name="P3">* exercise search *</text:p>
      <text:p text:style-name="P3">* update commands *</text:p>
      <text:p text:style-name="P3"/>
      <text:p text:style-name="P3">get_from_first_principles() i.e. get the aliases of all the parent nodes. (maybe use some parameters like pruned = True to get just one specific path if it branches too much)</text:p>
      <text:p text:style-name="P2"/>
      <text:p text:style-name="P2"/>
      <text:p text:style-name="P2">APPEND: proposed agent I/O-first tool layer</text:p>
      <text:p text:style-name="P2"/>
      <text:p text:style-name="P2">Guiding idea: Pi should not need to know the storage internals. It should call a small set of intent-level tools. Internally those tools may use lexical search, vector search, KG traversal, learner overlay, or source chunks.</text:p>
      <text:p text:style-name="P2"/>
      <text:p text:style-name="P2">Important architecture reminder: we have one canonical teacher KG plus one learner overlay keyed by node_id. The learner KG is a view, not a second persisted KG.</text:p>
      <text:p text:style-name="P2"/>
      <text:p text:style-name="P2">Recommended minimal tool set, grouped by what Pi needs during teaching:</text:p>
      <text:p text:style-name="P2"/>
      <text:p text:style-name="P2">1) context_retrieve(query, intent="teach", limit=8, include_user_state=True) -&gt; compact context packet</text:p>
      <text:p text:style-name="P2">This should be Pi’s default entry point. It should search node labels, aliases, descriptions, formulas, source chunks, and later optional embeddings/vector DB. It should then expand the best matches through KG edges and attach learner mastery/gaps. This is better than making Pi manually call vector search plus graph traversal every time.</text:p>
      <text:p text:style-name="P2"/>
      <text:p text:style-name="P2">Suggested output: matched_nodes, formulas, prerequisites, related_problem_types, source_quotes, learner_state, confidence/retrieval_scores.</text:p>
      <text:p text:style-name="P2"/>
      <text:p text:style-name="P2">2) get_node(query_or_id, fields=None, include_relatives=False, include_sources=True, include_user_state=True) -&gt; node packet</text:p>
      <text:p text:style-name="P2">This is the precise lookup tool. It should accept id, exact label, alias, or fuzzy concept string. fields can restrict output to description, extended_description, formulas, sources, learner_state, etc.</text:p>
      <text:p text:style-name="P2"/>
      <text:p text:style-name="P2">3) get_node_relatives(node, depth=1, direction="both", relation_types=None, unpack=False) -&gt; relatives packet</text:p>
      <text:p text:style-name="P2">Direction should support parents/prerequisites, children/dependents, or both. For our edge convention, A REQUIRES B means B is a parent/prerequisite of A. unpack=False returns ids/labels; unpack=True returns compact node JSONs too.</text:p>
      <text:p text:style-name="P2"/>
      <text:p text:style-name="P2">4) get_from_first_principles(node, max_paths=3, pruned=True) -&gt; prerequisite path(s)</text:p>
      <text:p text:style-name="P2">This returns prerequisite chains from foundations to the target node. It is different from general relatives because it should be path-shaped and useful for explanations like “what do we need from scratch?”.</text:p>
      <text:p text:style-name="P2"/>
      <text:p text:style-name="P2">5) get_proximal_dev(max_results=10, mode="exam_sprint") -&gt; ZPD packet</text:p>
      <text:p text:style-name="P2">Deterministic definition: unmastered nodes whose direct prerequisites are mastered and whose difficulty is near learner ability. Return ready nodes, blocked nodes, blocking prerequisites, mastery, difficulty, exam relevance, and a short reason.</text:p>
      <text:p text:style-name="P2"/>
      <text:p text:style-name="P2">6) get_learning_path(goal_node=None, mode="exam_sprint", max_steps=12) -&gt; path packet</text:p>
      <text:p text:style-name="P2">Deterministic function: collect transitive prerequisites for goal, remove mastered nodes, topologically sort, group into short sessions. If no goal is given, choose a high-value path from ZPD/exam relevance. Pi can then adapt or shorten the path conversationally.</text:p>
      <text:p text:style-name="P2"/>
      <text:p text:style-name="P2">7) search_exercises(query=None, target_nodes=None, difficulty=None, max_new_concepts=1, source_priority="course", limit=5) -&gt; exercise candidates</text:p>
      <text:p text:style-name="P2">This is essential for practical Physics training. It should return exercises with statement, source, tagged nodes, estimated difficulty, number_of_steps, algebra_load, trap flags, and whether a solution is available.</text:p>
      <text:p text:style-name="P2"/>
      <text:p text:style-name="P2">8) get_exercise(exercise_id, include_solution=False, include_context=True) -&gt; exercise packet</text:p>
      <text:p text:style-name="P2">Returns one exercise plus linked concepts/formulas/problem types, relevant source snippets, and learner-state snapshot for the required nodes. Solutions should be hidden by default unless Pi explicitly needs grading/support.</text:p>
      <text:p text:style-name="P2"/>
      <text:p text:style-name="P2">9) record_attempt(attempt_json) -&gt; attempt_id</text:p>
      <text:p text:style-name="P2">Append-only log of the user attempt: exercise_id, answer text, timestamp, time spent, confidence, optional scratch notes. This should not update mastery by itself; it records evidence.</text:p>
      <text:p text:style-name="P2"/>
      <text:p text:style-name="P2">10) update_learner(assessment_json) -&gt; mastery update packet</text:p>
      <text:p text:style-name="P2">Pi emits structured node evaluations after seeing an attempt; deterministic code applies BKT/linear update. Pi should not directly set mastery. Input should be a JSON packet with node_id, correct/partial correctness, quality 0-5, mistake text, confidence, question_type, and evidence.</text:p>
      <text:p text:style-name="P2"/>
      <text:p text:style-name="P2">Example assessment_json:</text:p>
      <text:p text:style-name="P2">{"exercise_id":"ex_123","node_evaluations":[{"node_id":"free_body_diagram","correct":false,"quality":2,"mistake":"forgot normal force","evidence":"answer used mg as the normal force on an incline"},{"node_id":"newton2","correct":true,"quality":4}]}</text:p>
      <text:p text:style-name="P2"/>
      <text:p text:style-name="P2">11) get_user_memory() / update_user_memory(memory_patch) -&gt; informal learner memory</text:p>
      <text:p text:style-name="P2">Separate from graph mastery. Store learning style, burnout/focus state, recurring difficulties, preferred explanation style, exam constraints, and session summaries. This memory should be concise and editable by Pi.</text:p>
      <text:p text:style-name="P2"/>
      <text:p text:style-name="P2">12) pack_teaching_context(mode, exercise_id=None, target_node=None, query=None, token_budget=3000) -&gt; final Pi context packet</text:p>
      <text:p text:style-name="P2">This should compose the exact compact context for one Pi teaching turn: current objective, exercise, relevant nodes, formulas, source quotes, ZPD snapshot, recent mistakes, user preferences, allowed actions, and any requested path. This may internally call all the other tools.</text:p>
      <text:p text:style-name="P2"/>
      <text:p text:style-name="P2">Vector database note:</text:p>
      <text:p text:style-name="P2">A vector DB is useful as an internal retrieval signal, but should not be the agent-facing abstraction. Pi should call context_retrieve or pack_teaching_context. Internally we can start with lexical/fuzzy search and add sqlite-vec/Chroma/LanceDB later without changing the Pi-facing interface. For math/Physics, graph edges remain the source of truth for prerequisites and formula relationships; vectors mainly find flexible entry points.</text:p>
      <text:p text:style-name="P2"/>
      <text:p text:style-name="P2">Node file / bash-like organization idea:</text:p>
      <text:p text:style-name="P2">Could be useful as an optional export: one JSON file per node in a folder tree by kind/topic, with aliases and metadata. This would let Pi use normal file tools if needed. But the primary interface should still be stable function calls, because paths/folders can become messy while tool I/O can stay compact and deterministic.</text:p>
      <text:p text:style-name="P2"/>
      <text:p text:style-name="P2">Suggested node attributes to add or standardize:</text:p>
      <text:p text:style-name="P2">extended_description: optional longer explanation, possibly visual/intuitive-first.</text:p>
      <text:p text:style-name="P2">difficulty: float 0-1.</text:p>
      <text:p text:style-name="P2">mastery_threshold: default 0.8, higher for threshold concepts.</text:p>
      <text:p text:style-name="P2">estimated_minutes: rough learning/practice time.</text:p>
      <text:p text:style-name="P2">exam_relevance: float 0-1.</text:p>
      <text:p text:style-name="P2">topic: e.g. kinematics, dynamics, energy.</text:p>
      <text:p text:style-name="P2">is_threshold_concept: boolean.</text:p>
      <text:p text:style-name="P2">common_traps: list of common misconceptions.</text:p>
      <text:p text:style-name="P2">exercise_ladder_level: recognition, direct_formula, two_step, mixed, exam, trap.</text:p>
      <text:p text:style-name="P2"/>
      <text:p text:style-name="P2">Minimal implementation order:</text:p>
      <text:p text:style-name="P2">A. Implement context_retrieve over existing KG using lexical/fuzzy search + graph expansion + learner overlay.</text:p>
      <text:p text:style-name="P2">B. Implement pack_teaching_context on top of context_retrieve, ZPD, path, and learner memory.</text:p>
      <text:p text:style-name="P2">C. Implement simple exercise index/search.</text:p>
      <text:p text:style-name="P2">D. Add optional vector index behind context_retrieve later, without changing Pi’s tool call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27T16:17:53.352588234</dc:date>
    <meta:editing-duration>PT35M48S</meta:editing-duration>
    <meta:editing-cycles>1</meta:editing-cycles>
    <meta:document-statistic meta:table-count="0" meta:image-count="0" meta:object-count="0" meta:page-count="1" meta:paragraph-count="10" meta:word-count="199" meta:character-count="1260" meta:non-whitespace-character-count="1070"/>
    <meta:generator>LibreOffice/26.2.4.2$Linux_X86_64 LibreOffice_project/620$Build-2</meta:generator>
  </office:meta>
</office:document-meta>
</file>